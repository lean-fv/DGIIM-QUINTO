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9.6979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2083in"/>
    </style:style>
    <style:style style:name="Table2.B" style:family="table-column">
      <style:table-column-properties style:column-width="1.7813in"/>
    </style:style>
    <style:style style:name="Table2.C" style:family="table-column">
      <style:table-column-properties style:column-width="1.7604in"/>
    </style:style>
    <style:style style:name="Table2.D" style:family="table-column">
      <style:table-column-properties style:column-width="4.9472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middle" fo:padding="0.0694in" fo:border="1pt solid #000000"/>
    </style:style>
    <style:style style:name="Table2.B13" style:family="table-cell">
      <style:table-cell-properties style:vertical-align="middle" fo:background-color="#999999" fo:padding="0.0694in" fo:border="1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end" style:justify-single-word="false" fo:orphans="0" fo:widows="0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orphans="0" fo:widows="0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orphans="0" fo:widows="0" fo:text-indent="0in" style:auto-text-indent="false"/>
      <style:text-properties fo:font-weight="bold" style:font-weight-asian="bold"/>
    </style:style>
    <style:style style:name="P12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13" style:family="paragraph" style:parent-style-name="Standard" style:master-page-name="Converted16">
      <style:paragraph-properties style:page-number="auto"/>
    </style:style>
    <style:style style:name="P14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moroqe573xg3"/>Recopilación y análisis de requisitos</text:p>
      <text:p text:style-name="Heading_20_1"><text:bookmark text:name="_v16eph73cvq5"/>Datos del Grupo de Trabajo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<text:span text:style-name="T1">Grupo Pequeño (prácticas y seminarios)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1">Grupo de trabajo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1">Integrantes</text:span></text:p>
          </table:table-cell>
          <table:table-cell table:style-name="Table1.A1" office:value-type="string">
            <text:p text:style-name="P5"><text:bookmark text:name="_zfu5ezqz1d1h"/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6"><text:span text:style-name="T1">Requisito funcional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"><office:annotation office:name="__Annotation__33_3572764616"><dc:creator>Ignacio José Blanco Medina</dc:creator><dc:date>2023-10-05T05:41:08</dc:date><text:p><text:span text:style-name="T3">RF01, RF02, ...</text:span></text:p></office:annotation><text:span text:style-name="T1">Número de referencia</text:span></text:p>
          </table:table-cell>
          <table:table-cell table:style-name="Table2.A1" table:number-columns-spanned="3" office:value-type="string">
            <text:p text:style-name="P5"><office:annotation-end office:name="__Annotation__33_3572764616"/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"><office:annotation office:name="__Annotation__37_3572764616"><dc:creator>Ignacio José Blanco Medina</dc:creator><dc:date>2023-10-05T05:41:23</dc:date><text:p><text:span text:style-name="T3">Un nombre corto (un verbo -por ejemplo, dar de alta un ítem- o una acción -por ejemplo, alta de ítem-)</text:span></text:p></office:annotation><text:span text:style-name="T1">Nombre del requisito</text:span></text:p>
          </table:table-cell>
          <table:table-cell table:style-name="Table2.A1" table:number-columns-spanned="3" office:value-type="string">
            <text:p text:style-name="P5"><office:annotation-end office:name="__Annotation__37_3572764616"/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"><office:annotation office:name="__Annotation__41_3572764616"><dc:creator>Ignacio José Blanco Medina</dc:creator><dc:date>2023-10-05T05:41:59</dc:date><text:p><text:span text:style-name="T3">Una descripción del requisito en el que se indique para qué se usan las entradas, qué se hace con ellas en el sistema y qué devuelve el sistema.</text:span></text:p></office:annotation><text:span text:style-name="T1">Descripción del requisito</text:span></text:p>
          </table:table-cell>
          <table:table-cell table:style-name="Table2.A1" table:number-columns-spanned="3" office:value-type="string">
            <text:p text:style-name="P5"><office:annotation-end office:name="__Annotation__41_3572764616"/></text:p>
          </table:table-cell>
          <table:covered-table-cell/>
          <table:covered-table-cell/>
        </table:table-row>
        <table:table-row table:style-name="Table2.1">
          <table:table-cell table:style-name="Table2.A1" table:number-rows-spanned="3" office:value-type="string">
            <text:p text:style-name="P4"><text:span text:style-name="T1">Entrada</text:span></text:p>
          </table:table-cell>
          <table:table-cell table:style-name="Table2.A1" office:value-type="string">
            <text:p text:style-name="P5"><office:annotation office:name="__Annotation__46_3572764616"><dc:creator>Ignacio José Blanco Medina</dc:creator><dc:date>2023-10-05T05:42:24</dc:date><text:p><text:span text:style-name="T3">¿Quién/qué (agente externo al sistema) proporciona la entrada?</text:span></text:p></office:annotation><text:span text:style-name="T1">Agente externo</text:span></text:p>
          </table:table-cell>
          <table:table-cell table:style-name="Table2.A1" table:number-columns-spanned="2" office:value-type="string">
            <text:p text:style-name="P5"><office:annotation-end office:name="__Annotation__46_3572764616"/></text:p>
          </table:table-cell>
          <table:covered-table-cell/>
        </table:table-row>
        <table:table-row table:style-name="Table2.1">
          <table:covered-table-cell/>
          <table:table-cell table:style-name="Table2.A1" table:number-rows-spanned="2" office:value-type="string">
            <text:p text:style-name="P5"><text:span text:style-name="T1">Requisito de datos</text:span></text:p>
          </table:table-cell>
          <table:table-cell table:style-name="Table2.A1" office:value-type="string">
            <text:p text:style-name="P2"><office:annotation office:name="__Annotation__51_3572764616"><dc:creator>Ignacio José Blanco Medina</dc:creator><dc:date>2023-10-05T05:43:12</dc:date><text:p><text:span text:style-name="T3">RD01, RD02, RD03, ... o RDi01, RDi02, ...</text:span></text:p></office:annotation><text:span text:style-name="T1">Número de referencia</text:span></text:p>
          </table:table-cell>
          <table:table-cell table:style-name="Table2.A1" office:value-type="string">
            <text:p text:style-name="P3"><office:annotation-end office:name="__Annotation__51_3572764616"/></text:p>
          </table:table-cell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4"><office:annotation office:name="__Annotation__55_3572764616"><dc:creator>Ignacio José Blanco Medina</dc:creator><dc:date>2023-10-05T05:44:23</dc:date><text:p><text:span text:style-name="T3">Elementos que integran la entrada de datos, indicando nombre para cada elemento y estructura del elemento (número entero, número real, secuencia de caracteres, ...)</text:span></text:p></office:annotation><text:span text:style-name="T1">Composición</text:span></text:p>
          </table:table-cell>
          <table:table-cell table:style-name="Table2.A1" office:value-type="string">
            <text:list xml:id="list277977953" text:style-name="WWNum1">
              <text:list-item>
                <text:p text:style-name="P8"><office:annotation-end office:name="__Annotation__55_3572764616"/></text:p>
              </text:list-item>
            </text:list>
          </table:table-cell>
        </table:table-row>
        <table:table-row table:style-name="Table2.1">
          <table:table-cell table:style-name="Table2.A1" table:number-rows-spanned="2" office:value-type="string">
            <text:p text:style-name="P4"><text:span text:style-name="T1">Datos internos</text:span></text:p>
          </table:table-cell>
          <table:table-cell table:style-name="Table2.A1" table:number-rows-spanned="2" office:value-type="string">
            <text:p text:style-name="P3"><text:span text:style-name="T1">Requisito de datos</text:span></text:p>
          </table:table-cell>
          <table:table-cell table:style-name="Table2.A1" office:value-type="string">
            <text:p text:style-name="P2"><office:annotation office:name="__Annotation__61_3572764616"><dc:creator>Ignacio José Blanco Medina</dc:creator><dc:date>2023-10-05T05:45:17</dc:date><text:p><text:span text:style-name="T3">RD01, RD02, RD03, ... o RDa01, RDa02, ... o RDBD01, RDBD02, ...</text:span></text:p></office:annotation><text:span text:style-name="T1">Número de referencia</text:span></text:p>
          </table:table-cell>
          <table:table-cell table:style-name="Table2.A1" office:value-type="string">
            <text:p text:style-name="P5"><office:annotation-end office:name="__Annotation__61_3572764616"/></text:p>
          </table:table-cell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2"><office:annotation office:name="__Annotation__65_3572764616"><dc:creator>Ignacio José Blanco Medina</dc:creator><dc:date>2023-10-05T05:47:08</dc:date><text:p><text:span text:style-name="T3">¿En qué cambia el nivel de información del sistema al realizarse esta funcionalidad o qué información necesita para llevarse a cabo? No tiene que ser una descripción exhaustiva sino una descripción de la información necesaria para realizar la funcionalidad.</text:span></text:p></office:annotation><text:span text:style-name="T1">Descripción</text:span></text:p>
          </table:table-cell>
          <table:table-cell table:style-name="Table2.A1" office:value-type="string">
            <text:p text:style-name="P3"><office:annotation-end office:name="__Annotation__65_3572764616"/></text:p>
          </table:table-cell>
        </table:table-row>
        <table:table-row table:style-name="Table2.1">
          <table:table-cell table:style-name="Table2.A1" table:number-rows-spanned="3" office:value-type="string">
            <text:p text:style-name="P2"><office:annotation office:name="__Annotation__69_3572764616"><dc:creator>Ignacio José Blanco Medina</dc:creator><dc:date>2023-10-05T05:51:22</dc:date><text:p><text:span text:style-name="T3">Si consideras que la funcionalidad no proporciona salida, puedes eliminar estas filas.</text:span></text:p></office:annotation><text:span text:style-name="T1">Salida</text:span></text:p>
          </table:table-cell>
          <table:table-cell table:style-name="Table2.A1" office:value-type="string">
            <text:p text:style-name="P3"><office:annotation-end office:name="__Annotation__69_3572764616"/><office:annotation office:name="__Annotation__73_3572764616"><dc:creator>Ignacio José Blanco Medina</dc:creator><dc:date>2023-10-05T05:47:30</dc:date><text:p><text:span text:style-name="T3">¿Quién/qué (agente externo al sistema) recibe la salida?</text:span></text:p></office:annotation><text:span text:style-name="T1">Agente externo</text:span></text:p>
          </table:table-cell>
          <table:table-cell table:style-name="Table2.A1" table:number-columns-spanned="2" office:value-type="string">
            <text:p text:style-name="P3"><office:annotation-end office:name="__Annotation__73_3572764616"/></text:p>
          </table:table-cell>
          <table:covered-table-cell/>
        </table:table-row>
        <table:table-row table:style-name="Table2.1">
          <table:covered-table-cell/>
          <table:table-cell table:style-name="Table2.A1" table:number-rows-spanned="2" office:value-type="string">
            <text:p text:style-name="P3"><text:span text:style-name="T1">Requisito de datos</text:span></text:p>
          </table:table-cell>
          <table:table-cell table:style-name="Table2.A1" office:value-type="string">
            <text:p text:style-name="P2"><office:annotation office:name="__Annotation__78_3572764616"><dc:creator>Ignacio José Blanco Medina</dc:creator><dc:date>2023-10-05T05:47:56</dc:date><text:p><text:span text:style-name="T3">RD01, RD02, RD03, ... o RDo01, RDo02, ...</text:span></text:p></office:annotation><text:span text:style-name="T1">Número de referencia</text:span></text:p>
          </table:table-cell>
          <table:table-cell table:style-name="Table2.A1" office:value-type="string">
            <text:p text:style-name="P3"><office:annotation-end office:name="__Annotation__78_3572764616"/></text:p>
          </table:table-cell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2"><text:span text:style-name="T1"><office:annotation office:name="__Annotation__82_3572764616"><dc:creator>Ignacio José Blanco Medina</dc:creator><dc:date>2023-10-05T05:48:19</dc:date><text:p><text:span text:style-name="T3">Elementos que integran la salida de datos, indicando nombre para cada elemento y estructura del elemento (número entero, número real, secuencia de caracteres, ...)</text:span></text:p></office:annotation></text:span><text:span text:style-name="T1">Composición</text:span><office:annotation-end office:name="__Annotation__82_3572764616"/></text:p>
          </table:table-cell>
          <table:table-cell table:style-name="Table2.A1" office:value-type="string">
            <text:list xml:id="list64244724187359" text:continue-numbering="true" text:style-name="WWNum1">
              <text:list-item>
                <text:p text:style-name="P12"/>
              </text:list-item>
            </text:list>
          </table:table-cell>
        </table:table-row>
        <table:table-row table:style-name="Table2.1">
          <table:table-cell table:style-name="Table2.A1" table:number-rows-spanned="2" office:value-type="string">
            <text:p text:style-name="P10"><office:annotation office:name="__Annotation__86_3572764616"><dc:creator>Ignacio José Blanco Medina</dc:creator><dc:date>2023-10-05T05:52:40</dc:date><text:p><text:span text:style-name="T3">Si consideras que la funcionalidad funciona sin restricciones semánticas (funciona siempre), puedes quitar estas líneas.</text:span></text:p><text:p><text:span text:style-name="T3">Si consideras que la funcionalidad funciona con varias restricciones semánticas, puedes replicar estas líneas para añadir más restricciones semánticas.</text:span></text:p></office:annotation><text:span text:style-name="T1">Restricciones semánticas</text:span></text:p>
          </table:table-cell>
          <table:table-cell table:style-name="Table2.B13" table:number-rows-spanned="2" office:value-type="string">
            <text:p text:style-name="P2"><office:annotation-end office:name="__Annotation__86_3572764616"/></text:p>
          </table:table-cell>
          <table:table-cell table:style-name="Table2.A1" office:value-type="string">
            <text:p text:style-name="P2"><office:annotation office:name="__Annotation__90_3572764616"><dc:creator>Ignacio José Blanco Medina</dc:creator><dc:date>2023-10-05T05:49:21</dc:date><text:p><text:span text:style-name="T3">RS01, RS02, ...</text:span></text:p></office:annotation><text:span text:style-name="T1">Número de referencia</text:span></text:p>
          </table:table-cell>
          <table:table-cell table:style-name="Table2.A1" office:value-type="string">
            <text:p text:style-name="P3"><office:annotation-end office:name="__Annotation__90_3572764616"/></text:p>
          </table:table-cell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2"><office:annotation office:name="__Annotation__94_3572764616"><dc:creator>Ignacio José Blanco Medina</dc:creator><dc:date>2023-10-05T05:50:45</dc:date><text:p><text:span text:style-name="T3">Una descripción que indique para qué casos de datos de entrada y de datos ya conocidos por el sistema (en su caso) la funcionalidad no se llevará a cabo.</text:span></text:p></office:annotation><text:span text:style-name="T1">Descripción</text:span></text:p>
          </table:table-cell>
          <table:table-cell table:style-name="Table2.A1" office:value-type="string">
            <text:p text:style-name="P3"><office:annotation-end office:name="__Annotation__94_357276461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11.6929in" fo:page-height="8.2681in" style:num-format="1" style:print-orientation="landscape" fo:margin-top="0.5902in" fo:margin-bottom="0.5in" fo:margin-left="1in" fo:margin-right="1in" style:writing-mode="lr-tb" style:layout-grid-color="#c0c0c0" style:layout-grid-lines="175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Converted1" style:page-layout-name="Mpm2">
      <style:footer>
        <text:p text:style-name="MP1"><text:page-number text:select-page="current">0</text:page-number></text:p>
      </style:footer>
    </style:master-page>
    <style:master-page style:name="Converted2" style:page-layout-name="Mpm2">
      <style:footer>
        <text:p text:style-name="MP1"><text:page-number text:select-page="current">0</text:page-number></text:p>
      </style:footer>
    </style:master-page>
    <style:master-page style:name="Converted3" style:page-layout-name="Mpm2">
      <style:footer>
        <text:p text:style-name="MP1"><text:page-number text:select-page="current">0</text:page-number></text:p>
      </style:footer>
    </style:master-page>
    <style:master-page style:name="Converted4" style:page-layout-name="Mpm2">
      <style:footer>
        <text:p text:style-name="MP1"><text:page-number text:select-page="current">0</text:page-number></text:p>
      </style:footer>
    </style:master-page>
    <style:master-page style:name="Converted5" style:page-layout-name="Mpm2">
      <style:footer>
        <text:p text:style-name="MP1"><text:page-number text:select-page="current">0</text:page-number></text:p>
      </style:footer>
    </style:master-page>
    <style:master-page style:name="Converted6" style:page-layout-name="Mpm2">
      <style:footer>
        <text:p text:style-name="MP1"><text:page-number text:select-page="current">0</text:page-number></text:p>
      </style:footer>
    </style:master-page>
    <style:master-page style:name="Converted7" style:page-layout-name="Mpm2">
      <style:footer>
        <text:p text:style-name="MP1"><text:page-number text:select-page="current">0</text:page-number></text:p>
      </style:footer>
    </style:master-page>
    <style:master-page style:name="Converted8" style:page-layout-name="Mpm2">
      <style:footer>
        <text:p text:style-name="MP1"><text:page-number text:select-page="current">0</text:page-number></text:p>
      </style:footer>
    </style:master-page>
    <style:master-page style:name="Converted9" style:page-layout-name="Mpm2">
      <style:footer>
        <text:p text:style-name="MP1"><text:page-number text:select-page="current">0</text:page-number></text:p>
      </style:footer>
    </style:master-page>
    <style:master-page style:name="Converted10" style:page-layout-name="Mpm2">
      <style:footer>
        <text:p text:style-name="MP1"><text:page-number text:select-page="current">0</text:page-number></text:p>
      </style:footer>
    </style:master-page>
    <style:master-page style:name="Converted11" style:page-layout-name="Mpm2">
      <style:footer>
        <text:p text:style-name="MP1"><text:page-number text:select-page="current">0</text:page-number></text:p>
      </style:footer>
    </style:master-page>
    <style:master-page style:name="Converted12" style:page-layout-name="Mpm2">
      <style:footer>
        <text:p text:style-name="MP1"><text:page-number text:select-page="current">0</text:page-number></text:p>
      </style:footer>
    </style:master-page>
    <style:master-page style:name="Converted13" style:page-layout-name="Mpm2">
      <style:footer>
        <text:p text:style-name="MP1"><text:page-number text:select-page="current">0</text:page-number></text:p>
      </style:footer>
    </style:master-page>
    <style:master-page style:name="Converted14" style:page-layout-name="Mpm2">
      <style:footer>
        <text:p text:style-name="MP1"><text:page-number text:select-page="current">0</text:page-number></text:p>
      </style:footer>
    </style:master-page>
    <style:master-page style:name="Converted15" style:page-layout-name="Mpm2">
      <style:footer>
        <text:p text:style-name="MP1"><text:page-number text:select-page="current">0</text:page-number></text:p>
      </style:footer>
    </style:master-page>
    <style:master-page style:name="Converted16" style:page-layout-name="Mpm3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57" meta:word-count="84" meta:character-count="488" meta:non-whitespace-character-count="449"/>
    <meta:generator>LibreOfficeDev/6.0.5.2$Linux_X86_64 LibreOffice_project/</meta:generator>
  </office:meta>
</office:document-meta>
</file>